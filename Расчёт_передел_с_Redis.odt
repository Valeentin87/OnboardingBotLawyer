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1f8" officeooo:paragraph-rsid="000ff1f8"/>
    </style:style>
    <style:style style:name="P2" style:family="paragraph" style:parent-style-name="Standard">
      <style:paragraph-properties fo:text-align="start" style:justify-single-word="false"/>
      <style:text-properties officeooo:rsid="000ff1f8" officeooo:paragraph-rsid="000ff1f8"/>
    </style:style>
    <style:style style:name="P3" style:family="paragraph" style:parent-style-name="Standard">
      <style:paragraph-properties fo:text-align="start" style:justify-single-word="false"/>
      <style:text-properties officeooo:rsid="000ff1f8" officeooo:paragraph-rsid="001447f9"/>
    </style:style>
    <style:style style:name="P4" style:family="paragraph" style:parent-style-name="Standard">
      <style:paragraph-properties fo:text-align="start" style:justify-single-word="false"/>
      <style:text-properties officeooo:paragraph-rsid="000ff1f8"/>
    </style:style>
    <style:style style:name="P5" style:family="paragraph" style:parent-style-name="Standard">
      <style:paragraph-properties fo:text-align="start" style:justify-single-word="false"/>
      <style:text-properties officeooo:paragraph-rsid="00127336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ff1f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f1f8" officeooo:paragraph-rsid="000ff1f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1f1e2" officeooo:paragraph-rsid="000ff1f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f1e2" officeooo:paragraph-rsid="0011f1e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f1e2" officeooo:paragraph-rsid="0012733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1f1e2" officeooo:paragraph-rsid="0013408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3fe03" officeooo:paragraph-rsid="0013fe03" fo:background-color="#ffff0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3fe03" officeooo:paragraph-rsid="001447f9" fo:background-color="#ffff0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447f9" officeooo:paragraph-rsid="001447f9" fo:background-color="#ffff0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34087" officeooo:paragraph-rsid="00134087"/>
    </style:style>
    <style:style style:name="P16" style:family="paragraph" style:parent-style-name="Standard">
      <style:paragraph-properties fo:text-align="start" style:justify-single-word="false"/>
      <style:text-properties officeooo:rsid="0013fe03" officeooo:paragraph-rsid="0013fe03" fo:background-color="#ffff00"/>
    </style:style>
    <style:style style:name="P17" style:family="paragraph" style:parent-style-name="normal1">
      <style:text-properties style:font-name="Times New Roman" fo:font-size="14pt" officeooo:rsid="00134087" officeooo:paragraph-rsid="0013fe03" style:font-name-asian="Times New Roman1" style:font-size-asian="14pt" style:font-name-complex="Times New Roman1" style:font-size-complex="14pt"/>
    </style:style>
    <style:style style:name="P18" style:family="paragraph" style:parent-style-name="normal1">
      <style:paragraph-properties fo:margin-left="0.75cm" fo:text-indent="-0.635cm" style:auto-text-indent="false"/>
      <style:text-properties officeooo:paragraph-rsid="000ff1f8"/>
    </style:style>
    <style:style style:name="P19" style:family="paragraph" style:parent-style-name="normal1">
      <style:paragraph-properties fo:margin-left="0.75cm" fo:text-indent="-0.635cm" style:auto-text-indent="false"/>
      <style:text-properties fo:font-weight="normal" officeooo:paragraph-rsid="00127336" style:font-weight-asian="normal" style:font-weight-complex="normal"/>
    </style:style>
    <style:style style:name="P20" style:family="paragraph" style:parent-style-name="normal1" style:list-style-name="WWNum2">
      <style:paragraph-properties fo:margin-left="0.75cm" fo:text-indent="-0.635cm" style:auto-text-indent="false"/>
      <style:text-properties officeooo:paragraph-rsid="000ff1f8"/>
    </style:style>
    <style:style style:name="P21" style:family="paragraph" style:parent-style-name="normal1">
      <style:paragraph-properties fo:margin-left="0.75cm" fo:text-indent="-0.635cm" style:auto-text-indent="false"/>
      <style:text-properties officeooo:paragraph-rsid="0011f1e2"/>
    </style:style>
    <style:style style:name="P22" style:family="paragraph" style:parent-style-name="normal1">
      <style:text-properties officeooo:paragraph-rsid="0011f1e2"/>
    </style:style>
    <style:style style:name="P23" style:family="paragraph" style:parent-style-name="normal1">
      <style:paragraph-properties fo:margin-left="0.75cm" fo:text-indent="-0.635cm" style:auto-text-indent="false"/>
      <style:text-properties officeooo:paragraph-rsid="00127336"/>
    </style:style>
    <style:style style:name="P24" style:family="paragraph" style:parent-style-name="normal1">
      <style:text-properties officeooo:paragraph-rsid="00127336"/>
    </style:style>
    <style:style style:name="P25" style:family="paragraph" style:parent-style-name="normal1">
      <style:paragraph-properties fo:margin-left="0.75cm" fo:text-indent="-0.635cm" style:auto-text-indent="false"/>
      <style:text-properties officeooo:paragraph-rsid="00134087"/>
    </style:style>
    <style:style style:name="P26" style:family="paragraph" style:parent-style-name="normal1">
      <style:text-properties officeooo:paragraph-rsid="00134087"/>
    </style:style>
    <style:style style:name="P27" style:family="paragraph" style:parent-style-name="normal1">
      <style:text-properties officeooo:paragraph-rsid="0013fe03"/>
    </style:style>
    <style:style style:name="P28" style:family="paragraph" style:parent-style-name="normal1">
      <style:text-properties officeooo:rsid="0013fe03" officeooo:paragraph-rsid="0013fe03"/>
    </style:style>
    <style:style style:name="P29" style:family="paragraph" style:parent-style-name="normal1">
      <style:paragraph-properties fo:margin-left="0.75cm" fo:text-indent="-0.635cm" style:auto-text-indent="false"/>
      <style:text-properties officeooo:paragraph-rsid="001447f9"/>
    </style:style>
    <style:style style:name="P30" style:family="paragraph" style:parent-style-name="normal1">
      <style:text-properties fo:color="#dc143c" loext:opacity="100%" officeooo:rsid="001447f9" officeooo:paragraph-rsid="001447f9"/>
    </style:style>
    <style:style style:name="P31" style:family="paragraph" style:parent-style-name="normal1">
      <style:text-properties fo:color="#dc143c" loext:opacity="100%" officeooo:rsid="00157cc0" officeooo:paragraph-rsid="00157c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1f8" style:font-weight-asian="bold" style:font-weight-complex="bold"/>
    </style:style>
    <style:style style:name="T3" style:family="text">
      <style:text-properties fo:font-weight="bold" officeooo:rsid="00127336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officeooo:rsid="0013fe03" fo:background-color="#ffff00" loext:char-shading-value="0" style:font-weight-asian="bold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ff1f8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1f1e2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34087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3fe03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447f9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0ff1f8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officeooo:rsid="0011f1e2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officeooo:rsid="00127336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officeooo:rsid="00134087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officeooo:rsid="0013fe03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font-weight="bold" fo:background-color="#ffff00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font-weight="bold" officeooo:rsid="0013fe03" fo:background-color="#ffff00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font-weight="normal" officeooo:rsid="0011f1e2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ru" fo:country="RU" fo:font-weight="bold" officeooo:rsid="00127336" style:letter-kerning="false" fo:background-color="#ffffff" loext:char-shading-value="0" style:font-name-asian="Times New Roman1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3" style:family="text">
      <style:text-properties style:font-name="Times New Roman" fo:font-size="14pt" fo:language="ru" fo:country="RU" fo:font-weight="bold" style:letter-kerning="false" fo:background-color="#ffffff" loext:char-shading-value="0" style:font-name-asian="Times New Roman1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4" style:family="text">
      <style:text-properties style:font-name="Times New Roman" fo:font-size="14pt" fo:language="ru" fo:country="RU" fo:font-weight="bold" officeooo:rsid="00157cc0" style:letter-kerning="false" fo:background-color="#ffffff" loext:char-shading-value="0" style:font-name-asian="Times New Roman1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5" style:family="text">
      <style:text-properties officeooo:rsid="0011f1e2"/>
    </style:style>
    <style:style style:name="T26" style:family="text">
      <style:text-properties officeooo:rsid="00127336"/>
    </style:style>
    <style:style style:name="T27" style:family="text">
      <style:text-properties officeooo:rsid="00134087"/>
    </style:style>
    <style:style style:name="T28" style:family="text">
      <style:text-properties fo:color="#3cb371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9" style:family="text">
      <style:text-properties fo:color="#3cb371" loext:opacity="100%" style:font-name="Times New Roman" fo:font-size="14pt" fo:font-weight="bold" officeooo:rsid="00134087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30" style:family="text">
      <style:text-properties fo:color="#3cb371" loext:opacity="100%" style:font-name="Times New Roman" fo:font-size="14pt" fo:font-weight="bold" officeooo:rsid="00127336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31" style:family="text">
      <style:text-properties fo:color="#3cb371" loext:opacity="100%" style:font-name="Times New Roman" fo:font-size="14pt" fo:font-weight="bold" officeooo:rsid="0013fe03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32" style:family="text">
      <style:text-properties fo:color="#3cb371" loext:opacity="100%" style:font-name="Times New Roman" fo:font-size="14pt" fo:language="ru" fo:country="RU" fo:font-weight="bold" officeooo:rsid="00127336" style:letter-kerning="false" fo:background-color="#ffffff" loext:char-shading-value="0" style:font-name-asian="Times New Roman1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33" style:family="text">
      <style:text-properties fo:color="#3cb371" loext:opacity="100%" style:font-name="Times New Roman" fo:font-size="14pt" fo:language="ru" fo:country="RU" fo:font-weight="bold" style:letter-kerning="false" fo:background-color="#ffffff" loext:char-shading-value="0" style:font-name-asian="Times New Roman1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34" style:family="text">
      <style:text-properties style:use-window-font-color="true" loext:opacity="0%" style:font-name="Times New Roman" fo:font-size="14pt" fo:language="ru" fo:country="RU" officeooo:rsid="00134087" style:letter-kerning="false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T35" style:family="text">
      <style:text-properties style:use-window-font-color="true" loext:opacity="0%" style:font-name="Times New Roman" fo:font-size="14pt" fo:language="ru" fo:country="RU" fo:font-weight="bold" officeooo:rsid="00127336" style:letter-kerning="false" style:font-name-asian="Times New Roman1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36" style:family="text">
      <style:text-properties officeooo:rsid="00144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Планируемые временные и финансовые затраты на доработку max-бота onboarding с целью организации обеспечения персинстентного (независимого от условий) хранения состояний каждого пользователя бота и обеспечения возврата к функционалу бота после «падения» бота или перезапуска сервера.</text:span></text:p>
      <text:p text:style-name="P1"><text:span text:style-name="T1"/></text:p>
      <text:p text:style-name="P4"><text:span text:style-name="T2">Функционал, перекрывающий отсутствие сохраненного состояния информацией из подключенной базой данных redis-server </text:span><text:span text:style-name="T3">с дублированием функционала, задуманного ранее</text:span></text:p>
      <text:p text:style-name="P4"><text:span text:style-name="T2"/></text:p>
      <text:p text:style-name="P4"><text:span text:style-name="T2">1. Клавиатура с выбором режима:</text:span></text:p>
      <text:p text:style-name="P16"><text:span text:style-name="T2">Т</text:span><text:span text:style-name="T1">иповой функционал — 500 р., количество повторений — 2 (Итого 1000 р)</text:span></text:p>
      <text:p text:style-name="P6"><text:span text:style-name="T7">👨‍💻 Новый сотрудник, <text:s/>- </text:span><text:span text:style-name="T10">500 р.</text:span></text:p>
      <text:p text:style-name="P6"><text:span text:style-name="T7">📈 Повышение квалификации — </text:span><text:span text:style-name="T10">500 р.</text:span></text:p>
      <text:p text:style-name="P6"><text:span text:style-name="T7"/></text:p>
      <text:p text:style-name="P7">2. Клавиатура с выбором отдела из списка:</text:p>
      <text:p text:style-name="P12">Типовой функционал — <text:span text:style-name="T36">10</text:span>00 р, количество повторений <text:span text:style-name="T36">(2 повторения — для имеющихся разработанных разделов и для разрабатываемых) (Итого 2000 р)</text:span></text:p>
      <text:list text:style-name="WWNum2">
        <text:list-item>
          <text:p text:style-name="P20" loext:marker-style-name="T6"><text:span text:style-name="T6">💼 Отдел продаж</text:span></text:p>
        </text:list-item>
        <text:list-item>
          <text:p text:style-name="P20" loext:marker-style-name="T6"><text:span text:style-name="T6">📐 Конструкторский отдел</text:span></text:p>
        </text:list-item>
        <text:list-item>
          <text:p text:style-name="P20" loext:marker-style-name="T6"><text:span text:style-name="T6">🔧 Производственно-технический отдел (ПТО)</text:span></text:p>
        </text:list-item>
        <text:list-item>
          <text:p text:style-name="P20" loext:marker-style-name="T6"><text:span text:style-name="T6">🧾 Бухгалтерский отдел</text:span></text:p>
        </text:list-item>
        <text:list-item>
          <text:p text:style-name="P20" loext:marker-style-name="T6"><text:span text:style-name="T6">⚖️ Юридический отдел</text:span></text:p>
        </text:list-item>
        <text:list-item>
          <text:p text:style-name="P20" loext:marker-style-name="T6"><text:span text:style-name="T6">👥 Кадровый отдел</text:span></text:p>
        </text:list-item>
        <text:list-item>
          <text:p text:style-name="P20" loext:marker-style-name="T6"><text:span text:style-name="T6">🛠️ Отдел сервиса</text:span></text:p>
        </text:list-item>
        <text:list-item>
          <text:p text:style-name="P20" loext:marker-style-name="T6"><text:span text:style-name="T6">🏭 Производство</text:span></text:p>
        </text:list-item>
      </text:list>
      <text:p text:style-name="P18" loext:marker-style-name="T6"><text:span text:style-name="T6"/></text:p>
      <text:p text:style-name="P7">3. Клавиатура при выборе не реализованной ветки:</text:p>
      <text:p text:style-name="P3"><text:span text:style-name="T4">Т</text:span><text:span text:style-name="T5">иповой функционал — 500 р., количество повторений — 2 (Итого 1000 р)</text:span> </text:p>
      <text:p text:style-name="P3"><text:span text:style-name="T6">🏠 Выбрать другой отдел </text:span></text:p>
      <text:p text:style-name="P2"><text:span text:style-name="T6">🔍Изучить продукт</text:span></text:p>
      <text:p text:style-name="P2"><text:span text:style-name="T6"/></text:p>
      <text:p text:style-name="P7">4. <text:span text:style-name="T25">Реализация кнопок основной клавиатуры </text:span>:</text:p>
      <text:p text:style-name="P13">Типовой функционал — 500 р., количество повторений — 3 (Итого 1500 р) </text:p>
      <text:p text:style-name="P21" loext:marker-style-name="T6"><text:span text:style-name="T6">🏢 О компании</text:span></text:p>
      <text:p text:style-name="P21" loext:marker-style-name="T6"><text:span text:style-name="T6">- </text:span><text:span text:style-name="T8">для Нового сотрудника (ветка ЮРИСТ)</text:span></text:p>
      <text:p text:style-name="P21" loext:marker-style-name="T6"><text:span text:style-name="T8">- для Нового сотрудника (ветка ОТДЕЛ ПРОДАЖ)</text:span></text:p>
      <text:p text:style-name="P21" loext:marker-style-name="T6"><text:span text:style-name="T8">- для Нового сотрудника (ветка ДРУГОЙ СОТРУДНИК)</text:span></text:p>
      <text:p text:style-name="P21" loext:marker-style-name="T6"><text:span text:style-name="T8"/></text:p>
      <text:p text:style-name="P8">5.Секция welcome-сообщений и кнопки:</text:p>
      <text:p text:style-name="P13">Типовой функционал — 500 р., количество повторений — <text:span text:style-name="T36">6 (с учётом 2-х кнопок)</text:span> (Итого <text:span text:style-name="T36">3000</text:span> р) </text:p>
      <text:p text:style-name="P22" loext:marker-style-name="T12"><text:span text:style-name="T6">“</text:span><text:span text:style-name="T12">Указать дату</text:span><text:span text:style-name="T6">”</text:span></text:p>
      <text:p text:style-name="P22" loext:marker-style-name="T12"><text:span text:style-name="T6">“</text:span><text:span text:style-name="T14">Выхожу завтра</text:span><text:span text:style-name="T6">”</text:span></text:p>
      <text:p text:style-name="P29" loext:marker-style-name="T6"><text:span text:style-name="T6">- </text:span><text:span text:style-name="T8">для Нового сотрудника (ветка ЮРИСТ)</text:span></text:p>
      <text:p text:style-name="P29" loext:marker-style-name="T6"><text:span text:style-name="T8">- для Нового сотрудника (ветка ОТДЕЛ ПРОДАЖ)</text:span></text:p>
      <text:p text:style-name="P29" loext:marker-style-name="T6"><text:soft-page-break/><text:span text:style-name="T8">- для Нового сотрудника (ветка ДРУГОЙ СОТРУДНИК)</text:span></text:p>
      <text:p text:style-name="P22" loext:marker-style-name="T12"><text:span text:style-name="T6"/></text:p>
      <text:p text:style-name="P9">6.Реализация кнопок с названиями курсов обучения:</text:p>
      <text:p text:style-name="P13">Типовой функционал — 500 р., количество повторений — <text:span text:style-name="T36">3</text:span> (Итого 1<text:span text:style-name="T36">5</text:span>00 р) </text:p>
      <text:p text:style-name="P23" loext:marker-style-name="T6"><text:span text:style-name="T12">💼</text:span><text:span text:style-name="T20"> Обучение по продажам </text:span></text:p>
      <text:p text:style-name="P19" loext:marker-style-name="T6"><text:span text:style-name="T6">💼 Обучение для юриста</text:span></text:p>
      <text:p text:style-name="P19" loext:marker-style-name="T6"><text:span text:style-name="T6">💼 Обучение по продукту</text:span></text:p>
      <text:p text:style-name="P2"><text:span text:style-name="T6"/></text:p>
      <text:p text:style-name="P10">6.Реализация кнопок:</text:p>
      <text:p text:style-name="P13">Типовой функционал — 500 р., количество повторений — <text:span text:style-name="T36">9 (с учётом 3-х кнопок)</text:span> (Итого <text:span text:style-name="T36">4</text:span>500 р) </text:p>
      <text:p text:style-name="P23" loext:marker-style-name="T6"><text:span text:style-name="T12">📊 Мой прогресс</text:span></text:p>
      <text:p text:style-name="P23" loext:marker-style-name="T6"><text:span text:style-name="T12">🏆 Рейтинг</text:span></text:p>
      <text:p text:style-name="P23" loext:marker-style-name="T6"><text:span text:style-name="T12">❓ Задать вопрос</text:span></text:p>
      <text:p text:style-name="P23" loext:marker-style-name="T6"><text:span text:style-name="T6">- </text:span><text:span text:style-name="T8">ветка ЮРИСТ</text:span></text:p>
      <text:p text:style-name="P23" loext:marker-style-name="T6"><text:span text:style-name="T8">- ветка ОТДЕЛ ПРОДАЖ</text:span></text:p>
      <text:p text:style-name="P23" loext:marker-style-name="T6"><text:span text:style-name="T14">- </text:span><text:span text:style-name="T21">ветка ДРУГОЙ СОТРУДНИК</text:span></text:p>
      <text:p text:style-name="P23" loext:marker-style-name="T6"><text:span text:style-name="T21"/></text:p>
      <text:p text:style-name="P11"><text:span text:style-name="T27">7</text:span>.Реализация кноп<text:span text:style-name="T27">ки</text:span>:</text:p>
      <text:p text:style-name="P13">Типовой функционал — 500 р., количество повторений — 3 (Итого 1500 р) </text:p>
      <text:p text:style-name="P25" loext:marker-style-name="T6"><text:span text:style-name="T14">📊 </text:span><text:span text:style-name="T16">Улучшить результат</text:span></text:p>
      <text:p text:style-name="P25" loext:marker-style-name="T6"><text:span text:style-name="T6">- </text:span><text:span text:style-name="T8">ветка ЮРИСТ</text:span></text:p>
      <text:p text:style-name="P25" loext:marker-style-name="T6"><text:span text:style-name="T8">- ветка ОТДЕЛ ПРОДАЖ</text:span></text:p>
      <text:p text:style-name="P25" loext:marker-style-name="T6"><text:span text:style-name="T14">- </text:span><text:span text:style-name="T21">ветка ДРУГОЙ СОТРУДНИК</text:span></text:p>
      <text:p text:style-name="P23" loext:marker-style-name="T6"><text:span text:style-name="T21"/></text:p>
      <text:p text:style-name="P10"><text:span text:style-name="T27">7</text:span>.Реализация кнопок <text:span text:style-name="T26">перехода в главное меню</text:span>:</text:p>
      <text:p text:style-name="P13">Типовой функционал — 200 р., количество повторений — 19 (Итого <text:span text:style-name="T36">3800</text:span> р) </text:p>
      <text:p text:style-name="P24" loext:marker-style-name="T6"><text:span text:style-name="T8">🏠 Вернуться в главное меню <text:s/>- </text:span></text:p>
      <text:p text:style-name="P24" loext:marker-style-name="T6"><text:span text:style-name="T8"/></text:p>
      <text:p text:style-name="P26" loext:marker-style-name="T6"><text:span text:style-name="T8">3 </text:span><text:span text:style-name="T9">раза в составе клавиатуры </text:span><text:span text:style-name="T28">finish_studying_kb</text:span></text:p>
      <text:p text:style-name="P26" loext:marker-style-name="T6"><text:span text:style-name="T34">9 раз в составе клавиатуры</text:span><text:span text:style-name="T28"> </text:span><text:span text:style-name="T29">education</text:span><text:span text:style-name="T28">_kb</text:span></text:p>
      <text:p text:style-name="P26" loext:marker-style-name="T6"><text:span text:style-name="T34">4 раза в составе клавиатуры</text:span><text:span text:style-name="T28"> </text:span><text:span text:style-name="T29">next_to_</text:span><text:span text:style-name="T28">education_kb</text:span></text:p>
      <text:p text:style-name="P26" loext:marker-style-name="T6"><text:span text:style-name="T34">3 раза в составе клавиатуры</text:span><text:span text:style-name="T29"> main_one_kb</text:span></text:p>
      <text:p text:style-name="P26" loext:marker-style-name="T6"><text:span text:style-name="T29"/></text:p>
      <text:p text:style-name="P15"><text:span text:style-name="T6"/></text:p>
      <text:p text:style-name="P24" loext:marker-style-name="T6"><text:span text:style-name="T8"/></text:p>
      <text:p text:style-name="P24" loext:marker-style-name="T6"><text:span text:style-name="T8"/></text:p>
      <text:p text:style-name="P5"><text:span text:style-name="T13">Функционал, перекрывающий отсутствие сохраненного состояния информацией из подключенной базой данных redis-server </text:span><text:span text:style-name="T15">с заменой функционала, задуманного ранее текстом сообщения, информирующего о необходимости перезапуска кнопкой /start</text:span></text:p>
      <text:p text:style-name="P5"><text:span text:style-name="T15"/></text:p>
      <text:p text:style-name="P5"><text:soft-page-break/><text:span text:style-name="T15"/></text:p>
      <text:p text:style-name="P24" loext:marker-style-name="T6"><text:span text:style-name="T15">📚 Продолжить обучение.</text:span></text:p>
      <text:p text:style-name="P13">Типовой функционал — 200 р., количество повторений — <text:span text:style-name="T36">32</text:span> (Итого <text:span text:style-name="T36">6400</text:span> р) </text:p>
      <text:p text:style-name="P26" loext:marker-style-name="T6"><text:span text:style-name="T34">3 раза в составе клавиатуры</text:span><text:span text:style-name="T12"> </text:span><text:span text:style-name="T32">continue</text:span><text:span text:style-name="T30">_studying_kb</text:span></text:p>
      <text:p text:style-name="P27" loext:marker-style-name="T6"><text:span text:style-name="T34">4 раза в составе клавиатуры</text:span><text:span text:style-name="T30"> </text:span><text:span text:style-name="T29">next_to_</text:span><text:span text:style-name="T30">education_kb</text:span></text:p>
      <text:p text:style-name="P27" loext:marker-style-name="T6"><text:span text:style-name="T34">4 раза в составе клавиатуры</text:span><text:span text:style-name="T31"> </text:span><text:span text:style-name="T28">next_to_educ_to_part_kb</text:span></text:p>
      <text:p text:style-name="P17" loext:marker-style-name="T6">21 раз в составе самостоятельных кнопок в воронках</text:p>
      <text:p text:style-name="P27" loext:marker-style-name="T6"><text:span text:style-name="T28"/></text:p>
      <text:p text:style-name="P27" loext:marker-style-name="T6"><text:span text:style-name="T15"/></text:p>
      <text:p text:style-name="P24" loext:marker-style-name="T6"><text:span text:style-name="T15">📝 </text:span><text:span text:style-name="T35">Перейти к тестированию</text:span></text:p>
      <text:p text:style-name="P14">Типовой функционал — 200 р., количество повторений — 28 (Итого 5600 р) </text:p>
      <text:p text:style-name="P27" loext:marker-style-name="T6"><text:span text:style-name="T34">28 раз в составе клавиатуры</text:span><text:span text:style-name="T17"> </text:span><text:span text:style-name="T32">final_start_test_kb</text:span></text:p>
      <text:p text:style-name="P28" loext:marker-style-name="T6"><text:span text:style-name="T12"/></text:p>
      <text:p text:style-name="P24" loext:marker-style-name="T6"><text:span text:style-name="T15"/></text:p>
      <text:p text:style-name="P24" loext:marker-style-name="T6"><text:span text:style-name="T15">📚 Приступить к тестированию</text:span></text:p>
      <text:p text:style-name="P14">Типовой функционал — 200 р., количество повторений — 28 (Итого 5600 р) </text:p>
      <text:p text:style-name="P27" loext:marker-style-name="T6"><text:span text:style-name="T34">28 раз в составе клавиатуры</text:span><text:span text:style-name="T17"> </text:span><text:span text:style-name="T32">start_test_kb</text:span></text:p>
      <text:p text:style-name="P27" loext:marker-style-name="T6"><text:span text:style-name="T32"/></text:p>
      <text:p text:style-name="P30" loext:marker-style-name="T6"><text:span text:style-name="T22">И</text:span><text:span text:style-name="T23">того: </text:span><text:span text:style-name="T24">28900 р.</text:span></text:p>
      <text:p text:style-name="P31" loext:marker-style-name="T6"><text:span text:style-name="T24">С</text:span><text:span text:style-name="T23">роки: от 7 до 10 дней</text:span></text:p>
      <text:p text:style-name="P30" loext:marker-style-name="T6"><text:span text:style-name="T23"/></text:p>
      <text:p text:style-name="P28" loext:marker-style-name="T6"><text:span text:style-name="T12"/></text:p>
      <text:p text:style-name="P23" loext:marker-style-name="T6"><text:span text:style-name="T12"/></text:p>
      <text:p text:style-name="P23" loext:marker-style-name="T6"><text:span text:style-name="T12"/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0" style:display-name="ListLabel 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6T00:41:13.260140827</meta:creation-date>
    <dc:date>2026-06-26T01:48:25.664564607</dc:date>
    <meta:editing-duration>PT1M33S</meta:editing-duration>
    <meta:editing-cycles>1</meta:editing-cycles>
    <meta:document-statistic meta:table-count="0" meta:image-count="0" meta:object-count="0" meta:page-count="3" meta:paragraph-count="74" meta:word-count="484" meta:character-count="3368" meta:non-whitespace-character-count="2925"/>
    <meta:generator>LibreOffice/24.2.7.2$Linux_X86_64 LibreOffice_project/420$Build-2</meta:generator>
  </office:meta>
</office:document-meta>
</file>